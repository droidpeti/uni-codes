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80000033BC702B5F2.png" manifest:media-type="image/png"/>
  <manifest:file-entry manifest:full-path="Pictures/100000010000034C000001CA82D4536F.png" manifest:media-type="image/png"/>
  <manifest:file-entry manifest:full-path="Pictures/10000001000002A70000031FCCFB66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4pt" fo:font-weight="normal" officeooo:rsid="00032aa4" officeooo:paragraph-rsid="00032aa4" style:font-size-asian="24pt" style:font-weight-asian="normal" style:font-size-complex="2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normal" officeooo:rsid="00048f0e" officeooo:paragraph-rsid="00048f0e" style:font-size-asian="24pt" style:font-weight-asian="normal" style:font-size-complex="2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6pt" fo:font-weight="normal" officeooo:rsid="00032aa4" officeooo:paragraph-rsid="00032aa4" style:font-size-asian="14pt" style:font-weight-asian="normal" style:font-size-complex="16pt" style:font-weight-complex="normal"/>
    </style:style>
    <style:style style:name="P4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fo:color="#3465a4" loext:opacity="100%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4pt" fo:font-weight="bold" officeooo:rsid="00032aa4" officeooo:paragraph-rsid="00032aa4" style:font-size-asian="14pt" style:font-weight-asian="bold" style:font-size-complex="14pt" style:font-weight-complex="bold"/>
    </style:style>
    <style:style style:name="P9" style:family="paragraph" style:parent-style-name="Heading_20_1">
      <style:text-properties fo:color="#3465a4" loext:opacity="100%" officeooo:paragraph-rsid="002426b1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0pt" fo:font-weight="normal" officeooo:rsid="00032aa4" officeooo:paragraph-rsid="00032aa4" style:font-size-asian="10pt" style:font-weight-asian="normal" style:font-size-complex="10pt" style:font-weight-complex="normal"/>
    </style:style>
    <style:style style:name="P11" style:family="paragraph" style:parent-style-name="Heading_20_1">
      <style:paragraph-properties fo:break-before="page"/>
      <style:text-properties fo:color="#3465a4" loext:opacity="100%"/>
    </style:style>
    <style:style style:name="P12" style:family="paragraph" style:parent-style-name="Heading_20_2">
      <style:text-properties fo:color="#3465a4" loext:opacity="100%" officeooo:rsid="001799f8" officeooo:paragraph-rsid="001799f8"/>
    </style:style>
    <style:style style:name="P13" style:family="paragraph" style:parent-style-name="Text_20_body">
      <style:paragraph-properties fo:text-align="justify" style:justify-single-word="false"/>
      <style:text-properties style:use-window-font-color="true" loext:opacity="0%" style:font-name="Liberation Sans" fo:font-weight="bold" officeooo:rsid="001799f8" officeooo:paragraph-rsid="001799f8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loext:opacity="0%" style:font-name="Liberation Sans" officeooo:rsid="001799f8" officeooo:paragraph-rsid="001799f8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loext:opacity="0%" officeooo:rsid="001799f8" officeooo:paragraph-rsid="001799f8"/>
    </style:style>
    <style:style style:name="P16" style:family="paragraph" style:parent-style-name="Text_20_body" style:list-style-name="L1">
      <style:paragraph-properties fo:text-align="justify" style:justify-single-word="false"/>
      <style:text-properties fo:color="#3465a4" loext:opacity="100%" officeooo:rsid="001799f8"/>
    </style:style>
    <style:style style:name="P17" style:family="paragraph" style:parent-style-name="Text_20_body" style:list-style-name="L1">
      <style:paragraph-properties fo:text-align="justify" style:justify-single-word="false"/>
      <style:text-properties style:use-window-font-color="true" loext:opacity="0%" style:font-name="Liberation Sans" officeooo:rsid="001f6236" officeooo:paragraph-rsid="001f6236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loext:opacity="0%" style:font-name="Liberation Sans" fo:font-weight="bold" officeooo:rsid="001799f8" officeooo:paragraph-rsid="001f6236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loext:opacity="0%" style:font-name="Liberation Sans" officeooo:rsid="001799f8" officeooo:paragraph-rsid="001f6236"/>
    </style:style>
    <style:style style:name="P20" style:family="paragraph" style:parent-style-name="Text_20_body">
      <style:paragraph-properties fo:text-align="justify" style:justify-single-word="false"/>
      <style:text-properties style:use-window-font-color="true" loext:opacity="0%" officeooo:rsid="001799f8" officeooo:paragraph-rsid="001f6236"/>
    </style:style>
    <style:style style:name="P21" style:family="paragraph" style:parent-style-name="Text_20_body">
      <style:paragraph-properties fo:text-align="justify" style:justify-single-word="false"/>
      <style:text-properties style:font-name="Liberation Sans" officeooo:rsid="001799f8" officeooo:paragraph-rsid="001f6236"/>
    </style:style>
    <style:style style:name="P22" style:family="paragraph" style:parent-style-name="Text_20_body">
      <style:paragraph-properties fo:text-align="justify" style:justify-single-word="false" fo:break-before="page"/>
      <style:text-properties style:use-window-font-color="true" loext:opacity="0%" fo:font-weight="bold" officeooo:rsid="001f6236" officeooo:paragraph-rsid="001f6236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use-window-font-color="true" loext:opacity="0%" fo:font-weight="normal" officeooo:rsid="001f6236" officeooo:paragraph-rsid="001f6236" style:font-weight-asian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use-window-font-color="true" loext:opacity="0%" fo:font-weight="bold" officeooo:rsid="001f8db1" officeooo:paragraph-rsid="001f8db1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style:use-window-font-color="true" loext:opacity="0%" style:font-name="Liberation Sans" officeooo:rsid="001799f8" officeooo:paragraph-rsid="001f8db1"/>
    </style:style>
    <style:style style:name="P26" style:family="paragraph" style:parent-style-name="Text_20_body">
      <style:paragraph-properties fo:text-align="justify" style:justify-single-word="false"/>
      <style:text-properties style:use-window-font-color="true" loext:opacity="0%" officeooo:rsid="001799f8" officeooo:paragraph-rsid="001f8db1"/>
    </style:style>
    <style:style style:name="P27" style:family="paragraph" style:parent-style-name="Text_20_body">
      <style:paragraph-properties fo:text-align="justify" style:justify-single-word="false"/>
      <style:text-properties style:use-window-font-color="true" loext:opacity="0%" fo:font-weight="normal" officeooo:rsid="001f6236" officeooo:paragraph-rsid="001f8db1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style:font-name="Liberation Sans" officeooo:rsid="001799f8"/>
    </style:style>
    <style:style style:name="P29" style:family="paragraph" style:parent-style-name="Heading_20_2">
      <style:text-properties fo:color="#3465a4" loext:opacity="100%"/>
    </style:style>
    <style:style style:name="P30" style:family="paragraph" style:parent-style-name="Standard">
      <style:paragraph-properties fo:text-align="left" style:justify-single-word="false"/>
      <style:text-properties fo:color="#000000" loext:opacity="100%" style:font-name="Liberation Sans" fo:font-size="14pt" fo:font-weight="normal" officeooo:rsid="000928c5" officeooo:paragraph-rsid="000928c5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left" style:justify-single-word="false"/>
      <style:text-properties fo:color="#2a6099" loext:opacity="100%" style:font-name="Liberation Sans" fo:font-size="18pt" fo:font-weight="normal" officeooo:rsid="000b1787" officeooo:paragraph-rsid="000928c5" style:font-size-asian="15.75pt" style:font-weight-asian="normal" style:font-size-complex="18pt" style:font-weight-complex="normal"/>
    </style:style>
    <style:style style:name="P32" style:family="paragraph" style:parent-style-name="Standard">
      <style:paragraph-properties fo:text-align="left" style:justify-single-word="false"/>
      <style:text-properties fo:color="#2a6099" loext:opacity="100%" style:font-name="Liberation Sans" fo:font-size="16pt" fo:font-weight="normal" officeooo:rsid="000b1787" officeooo:paragraph-rsid="000b1787" style:font-size-asian="14pt" style:font-weight-asian="normal" style:font-size-complex="16pt" style:font-weight-complex="normal"/>
    </style:style>
    <style:style style:name="P33" style:family="paragraph" style:parent-style-name="Heading_20_3">
      <style:text-properties fo:color="#3465a4" loext:opacity="100%"/>
    </style:style>
    <style:style style:name="P34" style:family="paragraph" style:parent-style-name="Standard">
      <style:paragraph-properties fo:text-align="left" style:justify-single-word="false"/>
      <style:text-properties fo:color="#000000" loext:opacity="100%" style:font-name="Liberation Sans" fo:font-size="12pt" fo:font-weight="normal" officeooo:rsid="000b1787" officeooo:paragraph-rsid="000b1787" style:font-size-asian="12pt" style:font-weight-asian="normal" style:font-size-complex="12pt" style:font-weight-complex="normal"/>
    </style:style>
    <style:style style:name="P35" style:family="paragraph" style:parent-style-name="Frame_20_contents">
      <style:paragraph-properties fo:text-align="left" style:justify-single-word="false"/>
      <style:text-properties style:font-name="Liberation Mono" officeooo:rsid="000cbce0" officeooo:paragraph-rsid="000cbce0"/>
    </style:style>
    <style:style style:name="P36" style:family="paragraph" style:parent-style-name="Standard">
      <style:paragraph-properties fo:text-align="left" style:justify-single-word="false"/>
      <style:text-properties fo:color="#000000" loext:opacity="100%" style:font-name="Liberation Mono" fo:font-size="12pt" fo:font-weight="normal" officeooo:rsid="000b1787" officeooo:paragraph-rsid="000b1787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left" style:justify-single-word="false"/>
      <style:text-properties fo:color="#2a6099" loext:opacity="100%" style:font-name="Liberation Sans" fo:font-size="18pt" fo:font-weight="normal" officeooo:rsid="000928c5" officeooo:paragraph-rsid="000928c5" style:font-size-asian="15.75pt" style:font-weight-asian="normal" style:font-size-complex="18pt" style:font-weight-complex="normal"/>
    </style:style>
    <style:style style:name="P38" style:family="paragraph" style:parent-style-name="Text_20_body">
      <style:paragraph-properties fo:text-align="left" style:justify-single-word="false"/>
      <style:text-properties fo:color="#000000" loext:opacity="100%" style:font-name="Liberation Sans" fo:font-size="12pt" fo:font-weight="normal" officeooo:rsid="000b1787" officeooo:paragraph-rsid="00212157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left" style:justify-single-word="false"/>
      <style:text-properties fo:color="#000000" loext:opacity="100%" style:font-name="Liberation Sans" fo:font-size="12pt" fo:font-weight="normal" officeooo:rsid="000b1787" officeooo:paragraph-rsid="00212157" style:font-size-asian="12pt" style:font-weight-asian="normal" style:font-size-complex="12pt" style:font-weight-complex="normal"/>
    </style:style>
    <style:style style:name="P40" style:family="paragraph" style:parent-style-name="Preformatted_20_Text">
      <style:paragraph-properties fo:text-align="left" style:justify-single-word="false"/>
      <style:text-properties style:font-name="Liberation Mono" officeooo:rsid="000cbce0" officeooo:paragraph-rsid="000cbce0"/>
    </style:style>
    <style:style style:name="P41" style:family="paragraph" style:parent-style-name="Text_20_body">
      <style:paragraph-properties fo:text-align="left" style:justify-single-word="false"/>
      <style:text-properties fo:color="#000000" loext:opacity="100%" style:font-name="Liberation Sans" fo:font-size="12pt" fo:font-weight="normal" officeooo:rsid="000b1787" officeooo:paragraph-rsid="000cbce0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left" style:justify-single-word="false"/>
      <style:text-properties fo:color="#000000" loext:opacity="100%" style:font-name="Liberation Sans" fo:font-size="12pt" fo:font-weight="normal" officeooo:rsid="000b1787" officeooo:paragraph-rsid="000cbce0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left" style:justify-single-word="false"/>
      <style:text-properties fo:color="#000000" loext:opacity="100%" style:font-name="Liberation Sans" fo:font-size="12pt" fo:font-weight="normal" officeooo:rsid="000b1787" officeooo:paragraph-rsid="000e3320" style:font-size-asian="12pt" style:font-weight-asian="normal" style:font-size-complex="12pt" style:font-weight-complex="normal"/>
    </style:style>
    <style:style style:name="P44" style:family="paragraph" style:parent-style-name="Heading_20_3">
      <style:paragraph-properties fo:break-before="page"/>
      <style:text-properties fo:color="#3465a4" loext:opacity="100%"/>
    </style:style>
    <style:style style:name="P45" style:family="paragraph" style:parent-style-name="Text_20_body">
      <style:paragraph-properties fo:text-align="left" style:justify-single-word="false"/>
      <style:text-properties fo:color="#000000" loext:opacity="100%" style:font-name="Liberation Sans" fo:font-size="12pt" fo:font-weight="normal" officeooo:rsid="000b1787" officeooo:paragraph-rsid="000e3320" style:font-size-asian="12pt" style:font-weight-asian="normal" style:font-size-complex="12pt" style:font-weight-complex="normal"/>
    </style:style>
    <style:style style:name="P46" style:family="paragraph" style:parent-style-name="Frame_20_contents">
      <style:paragraph-properties fo:text-align="left" style:justify-single-word="false"/>
      <style:text-properties style:font-name="Liberation Mono" officeooo:rsid="000e93cd" officeooo:paragraph-rsid="000e3320"/>
    </style:style>
    <style:style style:name="P47" style:family="paragraph" style:parent-style-name="Heading_20_3">
      <style:text-properties fo:color="#3465a4" loext:opacity="100%" officeooo:paragraph-rsid="00212157"/>
    </style:style>
    <style:style style:name="P48" style:family="paragraph" style:parent-style-name="Text_20_body">
      <style:paragraph-properties fo:text-align="left" style:justify-single-word="false"/>
      <style:text-properties fo:color="#000000" loext:opacity="100%" style:font-name="Liberation Sans" fo:font-size="12pt" fo:font-weight="normal" officeooo:rsid="000b1787" officeooo:paragraph-rsid="000e93cd" style:font-size-asian="12pt" style:font-weight-asian="normal" style:font-size-complex="12pt" style:font-weight-complex="normal"/>
    </style:style>
    <style:style style:name="P49" style:family="paragraph" style:parent-style-name="Heading_20_3">
      <style:paragraph-properties fo:break-before="page"/>
      <style:text-properties fo:color="#3465a4" loext:opacity="100%" officeooo:paragraph-rsid="00212157"/>
    </style:style>
    <style:style style:name="P50" style:family="paragraph" style:parent-style-name="Text_20_body">
      <style:paragraph-properties fo:text-align="left" style:justify-single-word="false"/>
      <style:text-properties fo:color="#3465a4" loext:opacity="100%" style:font-name="Liberation Sans" fo:font-size="12pt" fo:font-weight="normal" officeooo:rsid="000b1787" officeooo:paragraph-rsid="00212157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left" style:justify-single-word="false"/>
      <style:text-properties fo:color="#000000" loext:opacity="100%" officeooo:paragraph-rsid="00212157"/>
    </style:style>
    <style:style style:name="P52" style:family="paragraph" style:parent-style-name="Text_20_body">
      <style:paragraph-properties fo:text-align="left" style:justify-single-word="false"/>
      <style:text-properties fo:color="#000000" loext:opacity="100%" style:font-name="Liberation Sans" fo:font-size="12pt" fo:font-weight="normal" officeooo:rsid="000b1787" officeooo:paragraph-rsid="00217b7b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left" style:justify-single-word="false"/>
      <style:text-properties fo:color="#000000" loext:opacity="100%" style:font-name="Liberation Sans" fo:font-size="12pt" fo:font-weight="normal" officeooo:rsid="000b1787" officeooo:paragraph-rsid="00101fc7" style:font-size-asian="12pt" style:font-weight-asian="normal" style:font-size-complex="12pt" style:font-weight-complex="normal"/>
    </style:style>
    <style:style style:name="P54" style:family="paragraph" style:parent-style-name="Frame_20_contents">
      <style:paragraph-properties fo:text-align="left" style:justify-single-word="false"/>
      <style:text-properties style:font-name="Liberation Mono" fo:font-size="8pt" officeooo:rsid="000e93cd" officeooo:paragraph-rsid="00217b7b" style:font-size-asian="8pt" style:font-size-complex="8pt"/>
    </style:style>
    <style:style style:name="P55" style:family="paragraph" style:parent-style-name="Frame_20_contents">
      <style:paragraph-properties fo:text-align="left" style:justify-single-word="false"/>
      <style:text-properties style:font-name="Liberation Mono" fo:font-size="8pt" officeooo:rsid="000e93cd" officeooo:paragraph-rsid="0022c8ec" style:font-size-asian="8pt" style:font-size-complex="8pt"/>
    </style:style>
    <style:style style:name="P56" style:family="paragraph" style:parent-style-name="Standard">
      <style:paragraph-properties fo:text-align="left" style:justify-single-word="false"/>
      <style:text-properties fo:color="#2a6099" loext:opacity="100%" style:font-name="Liberation Sans" fo:font-size="16pt" fo:font-weight="normal" officeooo:rsid="001366ad" officeooo:paragraph-rsid="001366ad" style:font-size-asian="14pt" style:font-weight-asian="normal" style:font-size-complex="16pt" style:font-weight-complex="normal"/>
    </style:style>
    <style:style style:name="P57" style:family="paragraph" style:parent-style-name="Text_20_body" style:list-style-name="L2">
      <style:text-properties fo:color="#000000" loext:opacity="100%" style:font-name="Liberation Sans" officeooo:rsid="000b1787" officeooo:paragraph-rsid="0022c8ec" style:font-size-asian="12pt"/>
    </style:style>
    <style:style style:name="P58" style:family="paragraph" style:parent-style-name="Text_20_body" style:list-style-name="L2">
      <style:text-properties fo:color="#000000" loext:opacity="100%" style:font-name="Liberation Sans" officeooo:rsid="000b1787" style:font-size-asian="12pt"/>
    </style:style>
    <style:style style:name="P59" style:family="paragraph" style:parent-style-name="Heading_20_1">
      <style:paragraph-properties fo:break-before="page"/>
      <style:text-properties fo:color="#3465a4" loext:opacity="100%" officeooo:rsid="001502f7" officeooo:paragraph-rsid="001502f7"/>
    </style:style>
    <style:style style:name="P60" style:family="paragraph" style:parent-style-name="Text_20_body">
      <style:text-properties fo:color="#3465a4" loext:opacity="100%" officeooo:rsid="001502f7" officeooo:paragraph-rsid="001502f7"/>
    </style:style>
    <style:style style:name="T1" style:family="text">
      <style:text-properties officeooo:rsid="001f6236"/>
    </style:style>
    <style:style style:name="T2" style:family="text">
      <style:text-properties fo:font-weight="bold"/>
    </style:style>
    <style:style style:name="T3" style:family="text">
      <style:text-properties style:font-name="Liberation Sans" fo:font-weight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officeooo:rsid="001f6236"/>
    </style:style>
    <style:style style:name="T6" style:family="text">
      <style:text-properties style:use-window-font-color="true" loext:opacity="0%" style:font-name="Liberation Sans" officeooo:rsid="001f6236"/>
    </style:style>
    <style:style style:name="T7" style:family="text">
      <style:text-properties style:use-window-font-color="true" loext:opacity="0%" style:font-name="Liberation Sans"/>
    </style:style>
    <style:style style:name="T8" style:family="text">
      <style:text-properties fo:font-weight="normal" officeooo:rsid="001f6236" style:font-weight-asian="normal" style:font-weight-complex="normal"/>
    </style:style>
    <style:style style:name="T9" style:family="text">
      <style:text-properties fo:font-weight="normal" officeooo:rsid="001fd56a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f8db1"/>
    </style:style>
    <style:style style:name="T12" style:family="text">
      <style:text-properties fo:font-weight="normal" officeooo:rsid="001f8db1" style:font-weight-asian="normal" style:font-weight-complex="normal"/>
    </style:style>
    <style:style style:name="T13" style:family="text">
      <style:text-properties officeooo:rsid="001fd56a"/>
    </style:style>
    <style:style style:name="T14" style:family="text">
      <style:text-properties officeooo:rsid="00200e9b"/>
    </style:style>
    <style:style style:name="T15" style:family="text">
      <style:text-properties officeooo:rsid="0020893f"/>
    </style:style>
    <style:style style:name="T16" style:family="text">
      <style:text-properties officeooo:rsid="00212157"/>
    </style:style>
    <style:style style:name="T17" style:family="text">
      <style:text-properties fo:color="#3465a4" loext:opacity="100%" style:font-name="Liberation Sans" fo:font-size="14pt" fo:font-weight="bold" officeooo:rsid="00212157" style:font-size-asian="14pt" style:font-weight-asian="bold" style:font-size-complex="14pt" style:font-weight-complex="bold"/>
    </style:style>
    <style:style style:name="T18" style:family="text">
      <style:text-properties fo:color="#3465a4" loext:opacity="100%" style:font-name="Liberation Sans" fo:font-size="14pt" fo:font-weight="bold" officeooo:rsid="000b1787" style:font-size-asian="14pt" style:font-weight-asian="bold" style:font-size-complex="14pt" style:font-weight-complex="bold"/>
    </style:style>
    <style:style style:name="T19" style:family="text">
      <style:text-properties officeooo:rsid="00217b7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ktumorientált programozás</text:p>
      <text:p text:style-name="P1"><text:span text:style-name="T1">3</text:span>. Beadandó</text:p>
      <text:p text:style-name="P1"/>
      <text:p text:style-name="P1"/>
      <text:p text:style-name="P1"/>
      <text:p text:style-name="P1">Dokumentáció</text:p>
      <text:p text:style-name="P1"/>
      <text:p text:style-name="P1"/>
      <text:p text:style-name="P1">Ballai Péter Lóránt</text:p>
      <text:p text:style-name="P2">EYSEE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2026.0<text:span text:style-name="T1">5</text:span>.<text:span text:style-name="T1">22</text:span></text:p>
      <text:p text:style-name="P3"/>
      <text:p text:style-name="P3"><text:soft-page-break/></text:p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rtalom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rtalom</text:p>
          </text:index-title>
          <text:p text:style-name="P4"><text:a xlink:type="simple" xlink:href="#__RefHeading___Toc121_2474248903" office:name="Feladatleírás" text:style-name="Index_20_Link" text:visited-style-name="Index_20_Link">Feladatleírás<text:tab/>2</text:a></text:p>
          <text:p text:style-name="P4"><text:a xlink:type="simple" xlink:href="#__RefHeading___Toc123_2474248903" office:name="Fejlesztői dokumentáció" text:style-name="Index_20_Link" text:visited-style-name="Index_20_Link">Fejlesztői dokumentáció<text:tab/>4</text:a></text:p>
          <text:p text:style-name="P5"><text:a xlink:type="simple" xlink:href="#__RefHeading___Toc125_2474248903%20Copy%201" office:name="Típusleírás és Reprezentáció" text:style-name="Index_20_Link" text:visited-style-name="Index_20_Link">Típusleírás és Reprezentáció<text:tab/>4</text:a></text:p>
          <text:p text:style-name="P5"><text:a xlink:type="simple" xlink:href="#__RefHeading___Toc125_2474248903" office:name="Műveletek" text:style-name="Index_20_Link" text:visited-style-name="Index_20_Link">Műveletek<text:tab/>6</text:a></text:p>
          <text:p text:style-name="P5"><text:a xlink:type="simple" xlink:href="#__RefHeading___Toc127_2474248903" office:name="Osztálydiagram" text:style-name="Index_20_Link" text:visited-style-name="Index_20_Link">Osztálydiagram<text:tab/>6</text:a></text:p>
          <text:p text:style-name="P5"><text:a xlink:type="simple" xlink:href="#__RefHeading___Toc129_2474248903" office:name="Implementáció" text:style-name="Index_20_Link" text:visited-style-name="Index_20_Link">Implementáció<text:tab/>7</text:a></text:p>
          <text:p text:style-name="P6"><text:a xlink:type="simple" xlink:href="#__RefHeading___Toc897_2474248903" office:name="Terem osztály megvalósítása" text:style-name="Index_20_Link" text:visited-style-name="Index_20_Link">Terem osztály megvalósítása<text:tab/>7</text:a></text:p>
          <text:p text:style-name="P6"><text:a xlink:type="simple" xlink:href="#__RefHeading___Toc899_2474248903" office:name="Kis Terem osztály megvalósítása" text:style-name="Index_20_Link" text:visited-style-name="Index_20_Link">Kis Terem osztály megvalósítása<text:tab/>7</text:a></text:p>
          <text:p text:style-name="P6"><text:a xlink:type="simple" xlink:href="#__RefHeading___Toc901_2474248903" office:name="Nagy Terem osztály megvalósítása" text:style-name="Index_20_Link" text:visited-style-name="Index_20_Link">Nagy Terem osztály megvalósítása<text:tab/>8</text:a></text:p>
          <text:p text:style-name="P6"><text:a xlink:type="simple" xlink:href="#__RefHeading___Toc901_2474248903%20Copy%201" office:name="VIP Terem osztály megvalósítása" text:style-name="Index_20_Link" text:visited-style-name="Index_20_Link">VIP Terem osztály megvalósítása<text:tab/>8</text:a></text:p>
          <text:p text:style-name="P6"><text:a xlink:type="simple" xlink:href="#__RefHeading___Toc901_2474248903%20Copy%201%20Copy%201" office:name="Terem Gyár osztály megvalósítása" text:style-name="Index_20_Link" text:visited-style-name="Index_20_Link">Terem Gyár osztály megvalósítása<text:tab/>8</text:a></text:p>
          <text:p text:style-name="P6"><text:a xlink:type="simple" xlink:href="#__RefHeading___Toc901_2474248903%20Copy%201%20Copy%201%20Copy%201" office:name="Ülőhely osztály megvalósítása" text:style-name="Index_20_Link" text:visited-style-name="Index_20_Link">Ülőhely osztály megvalósítása<text:tab/>9</text:a></text:p>
          <text:p text:style-name="P6"><text:a xlink:type="simple" xlink:href="#__RefHeading___Toc903_2474248903" office:name="Filmszínházkezelő osztály megvalósítása" text:style-name="Index_20_Link" text:visited-style-name="Index_20_Link">Filmszínházkezelő osztály megvalósítása<text:tab/>11</text:a></text:p>
          <text:p text:style-name="P4"><text:a xlink:type="simple" xlink:href="#__RefHeading___Toc131_2474248903" office:name="Tesztelési terv" text:style-name="Index_20_Link" text:visited-style-name="Index_20_Link">Tesztelési terv<text:tab/>13</text:a></text:p>
          <text:p text:style-name="P4"><text:a xlink:type="simple" xlink:href="#__RefHeading___Toc131_2474248903%20Copy%201" office:name="Szekvencia Diagram" text:style-name="Index_20_Link" text:visited-style-name="Index_20_Link">Szekvencia Diagram<text:tab/>14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7" text:outline-level="1" text:is-list-header="true"><text:bookmark text:name="__RefHeading___Toc121_2474248903"/></text:h>
      <text:p text:style-name="P8"/>
      <text:p text:style-name="P8"><text:soft-page-break/>Objektumelvű/Objektumorientált programozás</text:p>
      <text:p text:style-name="P8"><text:span text:style-name="T1">3</text:span>. beadandó feladat</text:p>
      <text:h text:style-name="P9" text:outline-level="1"><text:bookmark-start text:name="__RefHeading___Toc121_2474248903 Copy 1"/>Feladatleírás<text:bookmark-end text:name="__RefHeading___Toc121_2474248903 Copy 1"/></text:h>
      <text:p text:style-name="P8"/>
      <text:p text:style-name="P10"><draw:frame draw:style-name="fr1" draw:name="Image3" text:anchor-type="char" svg:width="6.9252in" svg:height="8.1484in" draw:z-index="3"><draw:image xlink:href="Pictures/10000001000002A70000031FCCFB66BB.png" xlink:type="simple" xlink:show="embed" xlink:actuate="onLoad" draw:mime-type="image/png"/></draw:frame></text:p>
      <text:h text:style-name="P11" text:outline-level="1"><text:bookmark-start text:name="__RefHeading___Toc123_2474248903"/>Fejlesztői dokumentáció<text:bookmark-end text:name="__RefHeading___Toc123_2474248903"/></text:h>
      <text:h text:style-name="P12" text:outline-level="2"><text:bookmark-start text:name="__RefHeading___Toc125_2474248903 Copy 1"/>Típusleírás és Reprezentáció<text:bookmark-end text:name="__RefHeading___Toc125_2474248903 Copy 1"/></text:h>
      <text:p text:style-name="P13"><text:span text:style-name="T1">Terem</text:span> (<text:span text:style-name="T1">Venue</text:span>) - <text:span text:style-name="T1">Absztrakt</text:span></text:p>
      <text:p text:style-name="P14"><text:span text:style-name="T2">Típusleírás:</text:span> Egy általános, absztrakt <text:span text:style-name="T1">termet</text:span> leíró típus, amely összefogja a közös tulajdonságokat.</text:p>
      <text:p text:style-name="P15"><text:span text:style-name="T3">Reprezentáció:</text:span><text:span text:style-name="T4"> <text:tab/></text:span><text:span text:style-name="Source_20_Text"><text:span text:style-name="T4">Name</text:span></text:span><text:span text:style-name="T4"> (string): A </text:span><text:span text:style-name="T5">terem </text:span><text:span text:style-name="T4">neve.</text:span></text:p>
      <text:p text:style-name="P15"><text:span text:style-name="Source_20_Text"><text:span text:style-name="T4"><text:tab/><text:tab/><text:tab/></text:span></text:span><text:span text:style-name="Source_20_Text"><text:span text:style-name="T5">Category</text:span></text:span><text:span text:style-name="T4"> (</text:span><text:span text:style-name="T5">VenueCategory</text:span><text:span text:style-name="T4">): </text:span><text:span text:style-name="T5">A terem kategóriája</text:span><text:span text:style-name="T4">.</text:span></text:p>
      <text:list text:style-name="L1">
        <text:list-item>
          <text:list>
            <text:list-item>
              <text:list>
                <text:list-header>
                  <text:p text:style-name="P16"><text:span text:style-name="T6">RowCount </text:span><text:span text:style-name="T7">(int): A </text:span><text:span text:style-name="T6">sorok száma a teremben</text:span><text:span text:style-name="T7">.</text:span></text:p>
                  <text:p text:style-name="P17">SeatsPerRow (int): Az oszlopok száma a teremben.</text:p>
                  <text:p text:style-name="P17">GetDiscount (ViewerType) : int : Egy absztrakt metódus, amivel kitudjuk számolni a kedvezmény értékét.</text:p>
                </text:list-header>
              </text:list>
            </text:list-item>
          </text:list>
        </text:list-item>
      </text:list>
      <text:p text:style-name="P13"><text:span text:style-name="T1">KisTerem</text:span> (<text:span text:style-name="T1">SmallVenue</text:span>)</text:p>
      <text:p text:style-name="P14"><text:span text:style-name="T2">Típusleírás:</text:span> <text:span text:style-name="T1">A Kis típusú termet megvalósító osztály.</text:span></text:p>
      <text:p text:style-name="P15"><text:span text:style-name="T3">Reprezentáció: </text:span><text:span text:style-name="T4">Örökli a</text:span><text:span text:style-name="Source_20_Text"><text:span text:style-name="T4"> </text:span></text:span><text:span text:style-name="Source_20_Text"><text:span text:style-name="T5">Venue</text:span></text:span><text:span text:style-name="T4"> adattagjait.</text:span></text:p>
      <text:p text:style-name="P14"/>
      <text:p text:style-name="P18"><text:span text:style-name="T1">NagyTerem</text:span> (<text:span text:style-name="T1">LargeVenue</text:span>)</text:p>
      <text:p text:style-name="P19"><text:span text:style-name="T2">Típusleírás:</text:span> <text:span text:style-name="T1">A Nagy típusú termet megvalósító osztály.</text:span></text:p>
      <text:p text:style-name="P20"><text:span text:style-name="T3">Reprezentáció: </text:span><text:span text:style-name="T4">Örökli a</text:span><text:span text:style-name="Source_20_Text"><text:span text:style-name="T4"> </text:span></text:span><text:span text:style-name="Source_20_Text"><text:span text:style-name="T5">Venue</text:span></text:span><text:span text:style-name="T4"> adattagjait.</text:span></text:p>
      <text:p text:style-name="P19"/>
      <text:p text:style-name="P18"><text:span text:style-name="T1">VipTerem</text:span> (<text:span text:style-name="T1">VipVenue</text:span>)</text:p>
      <text:p text:style-name="P19"><text:span text:style-name="T2">Típusleírás:</text:span> <text:span text:style-name="T1">A VIP típusú termet megvalósító osztály.</text:span></text:p>
      <text:p text:style-name="P20"><text:span text:style-name="T2">Reprezentáció: </text:span>Örökli a<text:span text:style-name="Source_20_Text"><text:span text:style-name="T4"> </text:span></text:span><text:span text:style-name="Source_20_Text"><text:span text:style-name="T5">Venue</text:span></text:span> adattagjait.</text:p>
      <text:p text:style-name="P21"/>
      <text:p text:style-name="P18"><text:span text:style-name="T1">TeremGyár</text:span> (<text:span text:style-name="T1">VenueFactory) - Factory</text:span></text:p>
      <text:p text:style-name="P19"><text:span text:style-name="T2">Típusleírás:</text:span> <text:span text:style-name="T1">Egy gyártó osztály a termekhez.</text:span></text:p>
      <text:p text:style-name="P20"><text:span text:style-name="T2">Reprezentáció: </text:span><text:span text:style-name="T8">CreateVenue(</text:span><text:span text:style-name="T9">Venue</text:span><text:span text:style-name="T8">) : A paraméternek megfelelően visszatér egy teremmel.</text:span></text:p>
      <text:p text:style-name="P22">Ülés (Seat)</text:p>
      <text:p text:style-name="P19"><text:span text:style-name="T2">Típusleírás:</text:span> <text:span text:style-name="T1">Egy ülést ábrázoló osztály.</text:span></text:p>
      <text:p text:style-name="P20"><text:span text:style-name="T10">Reprezentáció: <text:tab/></text:span><text:span text:style-name="T8">Row (char) : A szék sorát tárolja.</text:span></text:p>
      <text:p text:style-name="P23"><text:tab/><text:tab/><text:tab/>Number (int) : A szék oszlopát tárolja.</text:p>
      <text:p text:style-name="P23"><text:tab/><text:tab/><text:tab/>State (SeatState) : A szék állapotát tárolja.</text:p>
      <text:p text:style-name="P23"><text:tab/><text:tab/><text:tab/>TransitionBooked(): Lefoglalja a széket.</text:p>
      <text:p text:style-name="P23"><text:span text:style-name="T11"><text:tab/><text:tab/><text:tab/>TransitionSold(): Véglegesen lefoglalja a széket, miután kifizették.</text:span></text:p>
      <text:p text:style-name="P23"/>
      <text:p text:style-name="P24">Előadás (Show)</text:p>
      <text:p text:style-name="P25"><text:span text:style-name="T2">Típusleírás:</text:span> <text:span text:style-name="T1">Egy </text:span><text:span text:style-name="T11">előadást</text:span><text:span text:style-name="T1"> ábrázoló osztály.</text:span></text:p>
      <text:p text:style-name="P26"><text:span text:style-name="T10">Reprezentáció: <text:tab/></text:span><text:span text:style-name="T12">Id </text:span><text:span text:style-name="T8">(</text:span><text:span text:style-name="T12">int</text:span><text:span text:style-name="T8">) : A</text:span><text:span text:style-name="T12">z</text:span><text:span text:style-name="T8"> </text:span><text:span text:style-name="T12">előadás azonosítója</text:span><text:span text:style-name="T8">.</text:span></text:p>
      <text:p text:style-name="P27"><text:tab/><text:tab/><text:tab/>N<text:span text:style-name="T11">ame</text:span> (<text:span text:style-name="T11">string</text:span>) : A <text:span text:style-name="T11">film neve</text:span>.</text:p>
      <text:p text:style-name="P27"><text:tab/><text:tab/><text:tab/><text:span text:style-name="T11">Time </text:span>(<text:span text:style-name="T11">string</text:span>) : <text:span text:style-name="T11">Az előadás időpontja</text:span>.</text:p>
      <text:p text:style-name="P27"><text:tab/><text:tab/><text:tab/><text:span text:style-name="T11">ShowVenue</text:span>(<text:span text:style-name="T11">Venue</text:span>): <text:span text:style-name="T11">Az előadás terme</text:span>.</text:p>
      <text:p text:style-name="P27"><text:span text:style-name="T11"><text:tab/><text:tab/><text:tab/>Seats(Seat*): Az előadáshoz tartozó székek.</text:span></text:p>
      <text:p text:style-name="P27"><text:span text:style-name="T11"><text:tab/><text:tab/><text:tab/>BasePrice(int): Az alapértelmezett ár.</text:span></text:p>
      <text:p text:style-name="P27"><text:tab/><text:tab/><text:tab/><text:span text:style-name="T11">GetSeat(</text:span><text:span text:style-name="T13">Seat) </text:span><text:span text:style-name="T11">: Visszaadja a megadott sorú és oszlopú széket.</text:span></text:p>
      <text:p text:style-name="P27"><text:tab/><text:tab/><text:tab/><text:span text:style-name="T11">GetFreeCount(int) : </text:span><text:span text:style-name="T13">Visszaadja a szabad helyek számát.</text:span></text:p>
      <text:p text:style-name="P27"><text:span text:style-name="T13"><text:tab/><text:tab/><text:tab/>GetBookedCount(int) : </text:span><text:span text:style-name="T14">Visszaadja a lefoglalt helyek számát.</text:span></text:p>
      <text:p text:style-name="P27"><text:span text:style-name="T14"><text:tab/><text:tab/><text:tab/>GetSoldCount(int) : Visszaadja a kifizetett helyek számét.</text:span></text:p>
      <text:p text:style-name="P27"><text:tab/><text:tab/><text:tab/><text:span text:style-name="T14">CalculatePrice(double) : Kiszámolja mennyi a kedvezményes ár.</text:span></text:p>
      <text:p text:style-name="P23"/>
      <text:p text:style-name="P28"/>
      <text:p text:style-name="P28"/>
      <text:p text:style-name="P28"/>
      <text:h text:style-name="P29" text:outline-level="2"><text:soft-page-break/></text:h>
      <text:h text:style-name="P29" text:outline-level="2"/>
      <text:h text:style-name="P29" text:outline-level="2"><text:bookmark-start text:name="__RefHeading___Toc125_2474248903"/>Műveletek<text:bookmark-end text:name="__RefHeading___Toc125_2474248903"/></text:h>
      <text:p text:style-name="P30"/>
      <text:p text:style-name="P30">1. Fájl beolvasása és feldolgozása<text:line-break/>Fájl sorainak beolvasása, osztálypéldányok tárolása.<text:line-break/><text:line-break/>2. Feldolgozott adatok megjelenítése<text:line-break/>A <text:span text:style-name="T15">legtöbb nézővel rendelkező film kiírása</text:span>.<text:line-break/><text:line-break/>3. <text:span text:style-name="T15">Egy előadás statisztikája kiírása.</text:span></text:p>
      <text:p text:style-name="P30"/>
      <text:h text:style-name="P29" text:outline-level="2"><text:bookmark-start text:name="__RefHeading___Toc127_2474248903"/>Osztálydiagram<text:bookmark-end text:name="__RefHeading___Toc127_2474248903"/></text:h>
      <text:p text:style-name="P31"><draw:frame draw:style-name="fr2" draw:name="Image1" text:anchor-type="char" svg:x="0.0173in" svg:y="0.0772in" svg:width="6.9252in" svg:height="5.5492in" draw:z-index="4"><draw:image xlink:href="Pictures/10000001000004080000033BC702B5F2.png" xlink:type="simple" xlink:show="embed" xlink:actuate="onLoad" draw:mime-type="image/png"/></draw:frame></text:p>
      <text:h text:style-name="P29" text:outline-level="2"><text:bookmark-start text:name="__RefHeading___Toc129_2474248903"/><text:soft-page-break/>Implementáció<text:bookmark-end text:name="__RefHeading___Toc129_2474248903"/></text:h>
      <text:p text:style-name="P32"/>
      <text:h text:style-name="P33" text:outline-level="3"><text:bookmark-start text:name="__RefHeading___Toc897_2474248903"/><text:span text:style-name="T16">Terem</text:span> osztály megvalósítása<text:bookmark-end text:name="__RefHeading___Toc897_2474248903"/></text:h>
      <text:p text:style-name="P34">A terem absztrakt osztály konstruktora, amit az öröklött osztályok meghívnak példányosításkor.</text:p>
      <text:p text:style-name="P32"><draw:frame draw:style-name="fr3" draw:name="Frame1" text:anchor-type="paragraph" svg:x="-0.0075in" svg:y="0.2173in" svg:width="5.9335in" draw:z-index="0"><draw:text-box fo:min-height="0.9374in"><text:p text:style-name="P35">Room(name: string, category: RoomCategory, rowCount: int, seatsPerRow: int)</text:p><text:p text:style-name="P35">Name := name</text:p><text:p text:style-name="P35">Category := category</text:p><text:p text:style-name="P35">RowCount := rowCount</text:p><text:p text:style-name="P35">SeatsPerRow := seatsPerRow</text:p></draw:text-box></draw:frame></text:p>
      <text:p text:style-name="P36"/>
      <text:p text:style-name="P37"/>
      <text:p text:style-name="P37"/>
      <text:p text:style-name="P37"/>
      <text:p text:style-name="P37"/>
      <text:p text:style-name="P38">Az osztály absztrakt metódusa, amit a leszármazott osztályok egyedi kedvezménytáblázat alapján írnak felül:</text:p>
      <text:p text:style-name="P39"><draw:frame draw:style-name="fr3" draw:name="Frame18" text:anchor-type="paragraph" svg:x="-0.0075in" svg:y="-0.0165in" svg:width="5.9335in" draw:z-index="6"><draw:text-box fo:min-height="0.2693in"><text:p text:style-name="P40"><text:span text:style-name="Source_20_Text">abstract GetDiscount(viewer: ViewerType) : int</text:span></text:p><text:p text:style-name="P35"/></draw:text-box></draw:frame></text:p>
      <text:h text:style-name="P33" text:outline-level="3"/>
      <text:h text:style-name="P33" text:outline-level="3"><text:bookmark-start text:name="__RefHeading___Toc899_2474248903"/><text:span text:style-name="T16">Kis Terem</text:span> osztály megvalósítása<text:bookmark-end text:name="__RefHeading___Toc899_2474248903"/></text:h>
      <text:p text:style-name="P41"><draw:frame draw:style-name="fr3" draw:name="Frame2" text:anchor-type="paragraph" svg:x="0.0028in" svg:y="0.3465in" svg:width="6.8161in" draw:z-index="1"><draw:text-box fo:min-height="0.9236in"><text:p text:style-name="P35">SmallRoom(name: string, rowCount: int, seatsPerRow: int)</text:p><text:p text:style-name="P35">base(name, Small, rowCount, seatsPerRow)</text:p><text:p text:style-name="P35"/><text:p text:style-name="P35">GetDiscount(viewer: ViewerType) : int</text:p><text:p text:style-name="P35">if viewer = Child then return 40</text:p><text:p text:style-name="P35">elsif viewer = Student then return 30</text:p><text:p text:style-name="P35">elsif viewer = Adult then return 10</text:p><text:p text:style-name="P35">elsif viewer = Pensioner then return 30</text:p><text:p text:style-name="P35">elsif viewer = Regular then return 30</text:p><text:p text:style-name="P35">endif</text:p><text:p text:style-name="P35">return 0</text:p></draw:text-box></draw:frame>A kis terem osztály konstruktora és a hozzá tartozó kedvezmény-meghatározás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/>
      <text:p text:style-name="P43"/>
      <text:p text:style-name="P43"/>
      <text:p text:style-name="P43"/>
      <text:h text:style-name="P44" text:outline-level="3"><text:bookmark-start text:name="__RefHeading___Toc901_2474248903"/><text:span text:style-name="T16">Nagy Terem</text:span> osztály megvalósítása<text:bookmark-end text:name="__RefHeading___Toc901_2474248903"/></text:h>
      <text:p text:style-name="P45"><draw:frame draw:style-name="fr3" draw:name="Frame5" text:anchor-type="paragraph" svg:x="-0.0047in" svg:y="0.3508in" svg:width="6.8898in" draw:z-index="2"><draw:text-box fo:min-height="0.9in"><text:p text:style-name="P46">LargeRoom(name: string, rowCount: int, seatsPerRow: int)</text:p><text:p text:style-name="P46">base(name, Large, rowCount, seatsPerRow)</text:p><text:p text:style-name="P46"/><text:p text:style-name="P46">GetDiscount(viewer: ViewerType) : int</text:p><text:p text:style-name="P46">if viewer = Child then return 40</text:p><text:p text:style-name="P46">elsif viewer = Student then return 20</text:p><text:p text:style-name="P46">elsif viewer = Adult then return 0</text:p><text:p text:style-name="P46">elsif viewer = Pensioner then return 20</text:p><text:p text:style-name="P46">elsif viewer = Regular then return 30</text:p><text:p text:style-name="P46">endif</text:p><text:p text:style-name="P46">return 0</text:p></draw:text-box></draw:frame>A nagy terem osztály konstruktora és a hozzá tartozó kedvezmény-meghatározás.</text:p>
      <text:h text:style-name="P47" text:outline-level="3" text:is-list-header="true"><text:bookmark-start text:name="__RefHeading___Toc901_2474248903 Copy 1"/><text:span text:style-name="T16">VIP Terem</text:span> osztály megvalósítása<text:bookmark-end text:name="__RefHeading___Toc901_2474248903 Copy 1"/></text:h>
      <text:p text:style-name="P48">A VIP terem osztály konstruktora, ahol a szabályzat értelmében nincs kedvezmény.</text:p>
      <text:h text:style-name="P47" text:outline-level="3" text:is-list-header="true"><draw:frame draw:style-name="fr3" draw:name="Frame3" text:anchor-type="paragraph" svg:x="-0.0047in" svg:y="0.0465in" svg:width="6.8898in" draw:z-index="7"><draw:text-box fo:min-height="0.9in"><text:p text:style-name="P46">VipRoom(name: string, rowCount: int, seatsPerRow: int)</text:p><text:p text:style-name="P46">base(name, VIP, rowCount, seatsPerRow)</text:p><text:p text:style-name="P46"/><text:p text:style-name="P46">GetDiscount(viewer: ViewerType) : int</text:p><text:p text:style-name="P46">return 0</text:p></draw:text-box></draw:frame><text:bookmark-start text:name="__RefHeading___Toc901_2474248903 Copy 1 Copy 1"/><text:span text:style-name="T16">Terem Gyár</text:span> osztály megvalósítása<text:bookmark-end text:name="__RefHeading___Toc901_2474248903 Copy 1 Copy 1"/></text:h>
      <text:p text:style-name="P38">A Terem gyár (<text:span text:style-name="Source_20_Text">RoomFactory</text:span>) osztály felelős a megfelelő teremobjektum példányosításáért a megadott kategória alapján.</text:p>
      <text:h text:style-name="P47" text:outline-level="3" text:is-list-header="true"><draw:frame draw:style-name="fr3" draw:name="Frame4" text:anchor-type="paragraph" svg:x="0.0217in" svg:y="0.128in" svg:width="6.8898in" draw:z-index="8"><draw:text-box fo:min-height="0.9in"><text:p text:style-name="P46">CreateRoom(categoryType: string) : Room</text:p><text:p text:style-name="P46">if categoryType = "Small" then return new SmallRoom()</text:p><text:p text:style-name="P46">elsif categoryType = "Large" then return new LargeRoom()</text:p><text:p text:style-name="P46">elsif categoryType = "VIP" then return new VipRoom()</text:p><text:p text:style-name="P46">endif</text:p><text:p text:style-name="P46">error</text:p></draw:text-box></draw:frame></text:h>
      <text:h text:style-name="P49" text:outline-level="3"><text:bookmark-start text:name="__RefHeading___Toc901_2474248903 Copy 1 Copy 1 Copy 1"/><text:span text:style-name="T16">Ülőhely</text:span> osztály megvalósítása<text:bookmark-end text:name="__RefHeading___Toc901_2474248903 Copy 1 Copy 1 Copy 1"/></text:h>
      <text:p text:style-name="P38">Az ülőhely osztály konstruktora és az állapotgép átmeneteit vezérlő tevékenységek.</text:p>
      <text:p text:style-name="P38"><draw:frame draw:style-name="fr3" draw:name="Frame6" text:anchor-type="paragraph" svg:x="0.0217in" svg:y="0.128in" svg:width="6.8898in" draw:z-index="9"><draw:text-box fo:min-height="0.9in"><text:p text:style-name="P46">Seat(row: char, number: int)</text:p><text:p text:style-name="P46">Row := row</text:p><text:p text:style-name="P46">Number := number</text:p><text:p text:style-name="P46">State := Free</text:p><text:p text:style-name="P46"/><text:p text:style-name="P46">TransitionToBooked()</text:p><text:p text:style-name="P46">if State = Free</text:p><text:p text:style-name="P46">then State := Booked</text:p><text:p text:style-name="P46">endif</text:p><text:p text:style-name="P46"/><text:p text:style-name="P46">TransitionToSold()</text:p><text:p text:style-name="P46">if State = Free or State = Booked</text:p><text:p text:style-name="P46">then State := Sold</text:p><text:p text:style-name="P46">endif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<text:span text:style-name="T17">Előadás</text:span><text:span text:style-name="T18"> osztály megvalósítása</text:span></text:p>
      <text:p text:style-name="P52">Az előadás osztály konstruktora, mely automatikusan legenerálja a hozzá rendelt terem széksorait, valamint a helyek statisztikáját lekérdező metódusok.</text:p>
      <text:p text:style-name="P52"><draw:frame draw:style-name="fr3" draw:name="Frame7" text:anchor-type="paragraph" svg:x="0.0217in" svg:y="0.128in" svg:width="6.8898in" draw:z-index="10"><draw:text-box fo:min-height="0.9in"><text:p text:style-name="P46">Show(id: string, filmName: string, time: string, showRoom: Room)</text:p><text:p text:style-name="P46">Id := id</text:p><text:p text:style-name="P46">FilmName := filmName</text:p><text:p text:style-name="P46">Time := time</text:p><text:p text:style-name="P46">ShowRoom := showRoom</text:p><text:p text:style-name="P46">BasePrice := 2000</text:p><text:p text:style-name="P46">Seats.Clear()</text:p><text:p text:style-name="P46"/><text:p text:style-name="P46">currentRow := 'A'</text:p><text:p text:style-name="P46">for i := 0 .. showRoom.RowCount - 1 loop</text:p><text:p text:style-name="P46"><text:s text:c="4"/>for j := 1 .. showRoom.SeatsPerRow loop</text:p><text:p text:style-name="P46"><text:s text:c="8"/>Seats.Add(new Seat(currentRow, j))</text:p><text:p text:style-name="P46"><text:s text:c="4"/>endloop</text:p><text:p text:style-name="P46"><text:s text:c="4"/>currentRow := currentRow + 1</text:p><text:p text:style-name="P46">endloop</text:p><text:p text:style-name="P46"/><text:p text:style-name="P46">GetSeat(row: char, number: int) : Seat</text:p><text:p text:style-name="P46">forall s in Seats loop</text:p><text:p text:style-name="P46"><text:s text:c="4"/>if s.Row = row and s.Number = number</text:p><text:p text:style-name="P46"><text:s text:c="4"/>then return s</text:p><text:p text:style-name="P46"><text:s text:c="4"/>endif</text:p><text:p text:style-name="P46">endloop</text:p><text:p text:style-name="P46">return null</text:p><text:p text:style-name="P46"/><text:p text:style-name="P46">GetFreeCount() : int</text:p><text:p text:style-name="P46">count := 0</text:p><text:p text:style-name="P46">forall s in Seats loop</text:p><text:p text:style-name="P46"><text:s text:c="4"/>if s.State = Free then count := count + 1 endif</text:p><text:p text:style-name="P46">endloop</text:p><text:p text:style-name="P46">return count</text:p><text:p text:style-name="P46"/><text:p text:style-name="P46">GetBookedCount() : int</text:p><text:p text:style-name="P46">count := 0</text:p><text:p text:style-name="P46">forall s in Seats loop</text:p><text:p text:style-name="P46"><text:s text:c="4"/>if s.State = Booked then count := count + 1 endif</text:p><text:p text:style-name="P46">endloop</text:p><text:p text:style-name="P46">return count</text:p><text:p text:style-name="P46"/><text:p text:style-name="P46">GetSoldCount() : int</text:p><text:p text:style-name="P46">count := 0</text:p><text:p text:style-name="P46">forall s in Seats loop</text:p><text:p text:style-name="P46"><text:s text:c="4"/>if s.State = Sold then count := count + 1 endif</text:p><text:p text:style-name="P46">endloop</text:p><text:p text:style-name="P46">return count</text:p><text:p text:style-name="P46"/><text:p text:style-name="P46">CalculatePrice(viewer: ViewerType) : double</text:p><text:p text:style-name="P46">discount := ShowRoom.GetDiscount(viewer)</text:p><text:p text:style-name="P46">return BasePrice * ((100.0 - discount) / 100.0)</text:p></draw:text-box></draw:frame><text:soft-page-break/></text:p>
      <text:h text:style-name="P44" text:outline-level="3"><text:bookmark-start text:name="__RefHeading___Toc903_2474248903"/><text:span text:style-name="T19">Filmszínházkezelő</text:span> osztály megvalósítása<text:bookmark-end text:name="__RefHeading___Toc903_2474248903"/></text:h>
      <text:p text:style-name="P53">A központi, szingleton mintát megvalósító osztály adatbeolvasó és statisztikai kiértékelő metódusai.</text:p>
      <text:h text:style-name="P33" text:outline-level="3"><draw:frame draw:style-name="fr3" draw:name="Frame8" text:anchor-type="paragraph" svg:x="0.0217in" svg:y="-0.0035in" svg:width="7.2437in" draw:z-index="11"><draw:text-box fo:min-height="9.6346in"><text:p text:style-name="P54">LoadData(filePath: string)</text:p><text:p text:style-name="P54">sr := new StreamReader(filePath)</text:p><text:p text:style-name="P54">while (line := sr.ReadLine()) != null loop</text:p><text:p text:style-name="P54"><text:tab/>parts := line.Split(";")</text:p><text:p text:style-name="P54"><text:tab/>if parts[0] = "ROOM"</text:p><text:p text:style-name="P55"><text:tab/><text:tab/>then room := RoomFactory.CreateRoom(parts[2])</text:p><text:p text:style-name="P55"><text:tab/><text:tab/>room.Name := parts[1]</text:p><text:p text:style-name="P55"><text:tab/><text:tab/>room.RowCount := int.Parse(parts[3]) <text:tab/><text:tab/><text:tab/><text:tab/><text:tab/><text:tab/><text:tab/><text:tab/><text:tab/>room.SeatsPerRow := int.Parse(parts[4])</text:p><text:p text:style-name="P54"><text:tab/><text:tab/>Rooms.Add(room) </text:p><text:p text:style-name="P54"><text:tab/>elsif parts[0] = "SHOW"</text:p><text:p text:style-name="P54"><text:tab/><text:tab/>then assignedRoom := null</text:p><text:p text:style-name="P54"><text:tab/><text:tab/>forall r in Rooms </text:p><text:p text:style-name="P54"><text:tab/><text:tab/><text:tab/>loop</text:p><text:p text:style-name="P54"><text:tab/><text:tab/><text:tab/>if r.Name = parts[4]</text:p><text:p text:style-name="P54"><text:tab/><text:tab/><text:tab/><text:tab/>then assignedRoom := r break</text:p><text:p text:style-name="P54"><text:tab/><text:tab/><text:tab/>endif </text:p><text:p text:style-name="P54"><text:tab/><text:tab/>endloop</text:p><text:p text:style-name="P55"><text:tab/><text:tab/>show := new Show(parts[1], parts[2], parts[3], assignedRoom)</text:p><text:p text:style-name="P55"><text:s/><text:tab/><text:tab/>Shows.Add(show)</text:p><text:p text:style-name="P54"><text:s/><text:tab/>elsif parts[0] = "BOOK"</text:p><text:p text:style-name="P54"><text:tab/><text:tab/>then targetShow := null</text:p><text:p text:style-name="P54"><text:tab/><text:tab/><text:tab/>forall s in Shows </text:p><text:p text:style-name="P54"><text:tab/><text:tab/><text:tab/><text:tab/>loop</text:p><text:p text:style-name="P54"><text:tab/><text:tab/><text:tab/><text:tab/>if s.Id = parts[1]</text:p><text:p text:style-name="P54"><text:tab/><text:tab/><text:tab/><text:tab/><text:tab/>then targetShow := s </text:p><text:p text:style-name="P54"><text:tab/><text:tab/><text:tab/><text:tab/><text:tab/>break</text:p><text:p text:style-name="P54"><text:tab/><text:tab/><text:tab/><text:tab/>endif</text:p><text:p text:style-name="P54"><text:tab/><text:tab/><text:tab/>endloop</text:p><text:p text:style-name="P55"><text:tab/><text:tab/>seat := targetShow.GetSeat(parts[2][0], int.Parse(parts[3]))</text:p><text:p text:style-name="P55"><text:s/><text:tab/><text:tab/>if seat != null</text:p><text:p text:style-name="P54"><text:tab/> <text:tab/><text:tab/>then seat.TransitionToBooked()</text:p><text:p text:style-name="P54"><text:tab/><text:tab/>endif </text:p><text:p text:style-name="P54"><text:tab/>elsif parts[0] = "BUY"</text:p><text:p text:style-name="P54"><text:tab/><text:tab/>then targetShow := null</text:p><text:p text:style-name="P54"><text:tab/><text:tab/>forall s in Shows </text:p><text:p text:style-name="P54"><text:tab/><text:tab/><text:tab/><text:span text:style-name="T19">l</text:span>oop </text:p><text:p text:style-name="P54"><text:tab/><text:tab/><text:tab/>if s.Id = parts[1]</text:p><text:p text:style-name="P54"><text:tab/><text:tab/><text:tab/><text:tab/>then targetShow := s break </text:p><text:p text:style-name="P54"><text:tab/><text:tab/><text:tab/>endif </text:p><text:p text:style-name="P55"><text:tab/><text:tab/>endloop </text:p><text:p text:style-name="P55"><text:tab/><text:tab/>seat := targetShow.GetSeat(parts[2][0], int.Parse(parts[3])) </text:p><text:p text:style-name="P55"><text:tab/><text:tab/>if seat != null</text:p><text:p text:style-name="P55"><text:tab/><text:tab/><text:tab/>then seat.TransitionToSold()</text:p><text:p text:style-name="P55"><text:tab/><text:tab/>endif </text:p><text:p text:style-name="P55"><text:tab/>endif </text:p><text:p text:style-name="P55">endloop</text:p><text:p text:style-name="P55">sr.Close()</text:p><text:p text:style-name="P55">PrintMostWatchedFilm()</text:p><text:p text:style-name="P55">films.Clear()</text:p><text:p text:style-name="P55">counts.Clear()</text:p><text:p text:style-name="P55">forall s in Shows </text:p><text:p text:style-name="P55"><text:tab/>loop</text:p><text:p text:style-name="P55"><text:tab/>soldCount := s.GetSoldCount()</text:p><text:p text:style-name="P55"><text:tab/>found := false for i := 0 .. |films| - 1 </text:p><text:p text:style-name="P55"><text:tab/><text:tab/>loop </text:p><text:p text:style-name="P55"><text:tab/><text:tab/><text:tab/>if films[i] = s.FilmName</text:p><text:p text:style-name="P55"><text:tab/><text:tab/><text:tab/><text:tab/>then counts[i] := counts[i] + soldCount </text:p><text:p text:style-name="P55"><text:tab/><text:tab/><text:tab/><text:tab/>found := true break </text:p><text:p text:style-name="P55"><text:tab/><text:tab/><text:tab/>endif</text:p><text:p text:style-name="P55"><text:tab/><text:tab/>endloop</text:p><text:p text:style-name="P55"><text:tab/>if not found </text:p><text:p text:style-name="P55"><text:tab/><text:tab/>then films.Add(s.FilmName)</text:p><text:p text:style-name="P55"><text:tab/><text:tab/>counts.Add(soldCount)</text:p><text:p text:style-name="P55"><text:tab/>endif </text:p><text:p text:style-name="P55">endloop</text:p><text:p text:style-name="P55">max := -1 </text:p><text:p text:style-name="P55">bestFilm := ""</text:p><text:p text:style-name="P55">for i := 0 .. |films| - 1 </text:p><text:p text:style-name="P55"><text:tab/>loop </text:p><text:p text:style-name="P55"><text:tab/><text:tab/>if counts[i] &gt; max </text:p><text:p text:style-name="P55"><text:tab/><text:tab/><text:tab/>then max := counts[i] </text:p><text:p text:style-name="P55"><text:tab/><text:tab/><text:tab/>bestFilm := films[i]</text:p><text:p text:style-name="P55"><text:tab/><text:tab/>endif</text:p><text:p text:style-name="P55">endloop</text:p><text:p text:style-name="P55">print("Most Watched Film: " + bestFilm + " (" + max + " tickets sold)")</text:p></draw:text-box></draw:frame><text:bookmark text:name="__RefHeading___Toc905_2474248903"/><text:soft-page-break/></text:h>
      <text:h text:style-name="P11" text:outline-level="1"><text:bookmark-start text:name="__RefHeading___Toc131_2474248903"/>Tesztelési terv<text:bookmark-end text:name="__RefHeading___Toc131_2474248903"/></text:h>
      <text:p text:style-name="P56"/>
      <text:list text:style-name="L2">
        <text:list-item>
          <text:p text:style-name="P57">Terem gyár (RoomFactory) példányosításának ellenőrzése helyes kategória azonosító ("Small", "Large", "VIP") esetén</text:p>
        </text:list-item>
        <text:list-item>
          <text:p text:style-name="P57">Terem gyár (RoomFactory) kivételkezelésének ellenőrzése ismeretlen vagy hibás kategória azonosító megadása esetén</text:p>
        </text:list-item>
        <text:list-item>
          <text:p text:style-name="P57">Ülőhely (Seat) állapotgépének ellenőrzése sikeres helyfoglalás (Free -&gt; Booked állapotátmenet) esetén</text:p>
        </text:list-item>
        <text:list-item>
          <text:p text:style-name="P57">Ülőhely (Seat) állapotgépének ellenőrzése sikeres jegyvásárlás (Free -&gt; Sold, illetve Booked -&gt; Sold állapotátmenet) esetén</text:p>
        </text:list-item>
        <text:list-item>
          <text:p text:style-name="P57">Ülőhely (Seat) állapotgépének ellenőrzése érvénytelen állapotátmenet (például már eladott jegy ismételt lefoglalása vagy megvásárlása) kísérlete esetén</text:p>
        </text:list-item>
        <text:list-item>
          <text:p text:style-name="P57">Terem (Room) típusfüggő kedvezményeinek (GetDiscount) ellenőrzése a normál (Kis és Nagy) termeknél, különböző nézőtípusok (Gyerek, Diák, Felnőtt, Nyugdíjas, Törzstag) esetén</text:p>
        </text:list-item>
        <text:list-item>
          <text:p text:style-name="P57">VIP Terem kedvezmény-kalkulációjának ellenőrzése (annak megerősítése, hogy minden nézőtípus esetén szigorúan 0% a kedvezmény)</text:p>
        </text:list-item>
        <text:list-item>
          <text:p text:style-name="P57">Előadás (Show) statisztikai metódusainak (GetFreeCount, GetBookedCount, GetSoldCount) ellenőrzése vegyes állapotú (szabad, foglalt, eladott) ülőhelyek megléte esetén</text:p>
        </text:list-item>
        <text:list-item>
          <text:p text:style-name="P57">Előadás (Show) jegyár-kalkulációjának (CalculatePrice) ellenőrzése az alapár és a terem által biztosított kedvezmény helyes érvényesítése alapján</text:p>
        </text:list-item>
        <text:list-item>
          <text:p text:style-name="P57">Filmszínház kezelő (CinemaManager) adatbeolvasásának (LoadData) ellenőrzése helyesen formázott szöveges állomány (termek, előadások, foglalások, vásárlások) esetén</text:p>
        </text:list-item>
        <text:list-item>
          <text:p text:style-name="P57">Filmszínház kezelő (CinemaManager) statisztikájának ellenőrzése a legtöbb nézőt vonzó film (PrintMostWatchedFilm) helyes összesítése és kiválasztása során, több azonos című előadás adatainak összevonásával</text:p>
          <text:p text:style-name="P58"/>
        </text:list-item>
      </text:list>
      <text:h text:style-name="P59" text:outline-level="1"><text:bookmark-start text:name="__RefHeading___Toc131_2474248903 Copy 1"/>Szekvencia Diagram<text:bookmark-end text:name="__RefHeading___Toc131_2474248903 Copy 1"/></text:h>
      <text:p text:style-name="P60"><draw:frame draw:style-name="fr4" draw:name="Image2" text:anchor-type="char" svg:width="6.9252in" svg:height="3.7575in" draw:z-index="5"><draw:image xlink:href="Pictures/100000010000034C000001CA82D453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Frame_20_Contents" style:display-name="Frame Contents" style:family="paragraph" style:parent-style-name="Standard"/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9T14:23:10.025904049</meta:creation-date>
    <meta:generator>LibreOffice/26.2.3.2$Linux_X86_64 LibreOffice_project/620$Build-2</meta:generator>
    <dc:date>2026-05-22T16:25:40.510324048</dc:date>
    <meta:editing-duration>PT1H47M19S</meta:editing-duration>
    <meta:editing-cycles>21</meta:editing-cycles>
    <meta:print-date>2026-04-19T18:06:04.742640509</meta:print-date>
    <meta:printed-by>PDF files</meta:printed-by>
    <meta:document-statistic meta:table-count="0" meta:image-count="3" meta:object-count="0" meta:page-count="14" meta:paragraph-count="265" meta:word-count="1268" meta:character-count="9517" meta:non-whitespace-character-count="8253"/>
  </office:meta>
</office:document-meta>
</file>